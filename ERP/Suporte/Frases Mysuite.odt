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Standard" style:master-page-name="First_20_Page">
      <style:paragraph-properties fo:text-align="justify" style:justify-single-word="false" style:page-number="auto"/>
      <style:text-properties fo:color="#ff0000"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justify" style:justify-single-word="false"/>
      <style:text-properties fo:color="#ff0000" fo:language="pt" fo:country="B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Não interação no ticket)</text:p>
      <text:p text:style-name="P2">Caro cliente em virtude de não haver nenhuma interação, estaremos concluindo esse ticket de suporte, mas fique a vontade para reabri-lo ou criar novos sempre que precisar.</text:p>
      <text:p text:style-name="P2"/>
      <text:p text:style-name="P5">(Finalização de ticket)</text:p>
      <text:p text:style-name="P2">A Patrimonio Tecnologia agradece seu contato.</text:p>
      <text:p text:style-name="P2">Estamos concluindo esse ticket. Fique a vontade para reabri-lo ou criar novos sempre que precisar.</text:p>
      <text:p text:style-name="P2"/>
      <text:p text:style-name="P5">(Retorno de posição com finalização)</text:p>
      <text:p text:style-name="P2">A Patrimonio Tecnologia agradece seu retorno. Estamos concluindo esse ticket, mas fique à vontade para reabri-lo ou criar novos sempre que precisar.</text:p>
      <text:p text:style-name="P2"/>
      <text:p text:style-name="P5">(Recebimento de pedidos para desenvolvimento)</text:p>
      <text:p text:style-name="P2"/>
      <text:p text:style-name="P2">Caro cliente, obrigado por contatar a patrimônio tecnologia, Estaremos encaminhando seu pedido ao setor responsável para avaliação da sua solicitação e no prazo médio de 30 dias estaremos informando viabilidade do desenvolvimento. (a ponderar)</text:p>
      <text:p text:style-name="P2"/>
      <text:p text:style-name="P5">Encaminhamento de suporte a análise</text:p>
      <text:p text:style-name="P2">Caro cliente, o recurso requer uma analise criteriosa e aprofundada, estaremos encaminhando sua solicitação ao setor responsável e em breve retornaremos com a resolução pretendida.</text:p>
      <text:p text:style-name="P2"/>
      <text:p text:style-name="P5">Dizendo não para o cliente solicitando desenvolvimento que não abrange o projeto “Ativo”</text:p>
      <text:p text:style-name="P5"/>
      <text:p text:style-name="P2">Bom dia Sr. Esteffson,</text:p>
      <text:p text:style-name="P2">Realmente é dessa forma que o sistema funciona. <text:span text:style-name="T1">A finalidade do vencimento que consta no Ativo.Com é para registrar a data do vencimento da ultima entrada do referido produto.</text:span></text:p>
      <text:p text:style-name="P2">O sistema que possui o recurso de trabalhar o vencimento, é o sistema Ativo.Log; Caso a empresa do ramo Varejo queira trabalhar com lote vencimento deverá implantar a tecnologia WMS.</text:p>
      <text:p text:style-name="P2">Primeiramente para usar essa tecnologia deve entrar em contato com o setor comercial, que irá explicar quais os requisitos necessários para utilizar, e analisar se é possível implantá-lo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yton</meta:initial-creator>
    <meta:editing-cycles>14</meta:editing-cycles>
    <meta:print-date>2012-01-06T12:22:00</meta:print-date>
    <meta:creation-date>2012-01-06T12:17:00</meta:creation-date>
    <dc:date>2012-05-30T08:45:09.94</dc:date>
    <meta:editing-duration>PT40M4S</meta:editing-duration>
    <meta:generator>OpenOffice.org/3.3$Win32 OpenOffice.org_project/330m20$Build-9567</meta:generator>
    <meta:document-statistic meta:table-count="0" meta:image-count="0" meta:object-count="0" meta:page-count="1" meta:paragraph-count="16" meta:word-count="256" meta:character-count="170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